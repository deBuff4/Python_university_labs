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B000000A67CE61487.png" manifest:media-type="image/png"/>
  <manifest:file-entry manifest:full-path="Pictures/100000010000029E0000036261ACA4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82cm" style:contextual-spacing="false" fo:break-before="page"/>
    </style:style>
    <style:style style:name="P7" style:family="paragraph" style:parent-style-name="Standard">
      <style:text-properties style:font-name="Times New Roman" fo:font-size="12pt" officeooo:rsid="00096bc4" officeooo:paragraph-rsid="00096bc4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0" style:family="paragraph" style:parent-style-name="Standard">
      <style:text-properties officeooo:rsid="0009904b" officeooo:paragraph-rsid="0009904b"/>
    </style:style>
    <style:style style:name="P11" style:family="paragraph" style:parent-style-name="Standard">
      <style:paragraph-properties fo:margin-top="0cm" fo:margin-bottom="0.282cm" style:contextual-spacing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e2d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6bc4" style:font-size-asian="12pt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80808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0033b3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00000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b200b2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94558d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00627a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00008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067d17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1750eb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, СВЯЗИ И МАССОВЫХ КОММУНИКАЦИЙ РОССИЙСКОЙ ФЕДЕРАЦИИ</text:span><text:span text:style-name="T1"/></text:p>
      <text:p text:style-name="P1" loext:marker-style-name="T1"><text:span text:style-name="T1">Ордена Трудового Красного Знамени 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/>
      <text:p text:style-name="P1" loext:marker-style-name="T2"><text:span text:style-name="T2">Кафедра Программная инженерия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2">ОТЧЕТ</text:span><text:span text:style-name="T2"/></text:p>
      <text:p text:style-name="P1" loext:marker-style-name="T2"><text:span text:style-name="T2">по лабораторной работе №</text:span><text:span text:style-name="T3">6</text:span></text:p>
      <text:p text:style-name="P1" loext:marker-style-name="T2"><text:span text:style-name="T2">по дисциплине «Введение в информационные технологии»</text:span><text:span text:style-name="T2"/></text:p>
      <text:p text:style-name="P2" loext:marker-style-name="T2"/>
      <text:p text:style-name="P1" loext:marker-style-name="T2"><text:span text:style-name="T2">Тема: «Работа с классами</text:span><text:span text:style-name="T3">, часть </text:span><text:span text:style-name="T4">3</text:span><text:span text:style-name="T2">»</text:span></text:p>
      <text:p text:style-name="P3" loext:marker-style-name="T2"/>
      <text:p text:style-name="P4" loext:marker-style-name="T2"><text:span text:style-name="T2">Выполнил: студент группы БВТ2504</text:span><text:span text:style-name="T2"/></text:p>
      <text:p text:style-name="P4" loext:marker-style-name="T2"><text:span text:style-name="T2">Гапеев Алексей Денисович</text:span><text:span text:style-name="T2"/></text:p>
      <text:p text:style-name="P5" loext:marker-style-name="T2"/>
      <text:p text:style-name="P4" loext:marker-style-name="T2"><text:span text:style-name="T2">Проверил: Харрасов К.Р.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3" loext:marker-style-name="T2"/>
      <text:p text:style-name="P1" loext:marker-style-name="T2"><text:span text:style-name="T2">Москва, 2025</text:span><text:span text:style-name="T2"/></text:p>
      <text:p text:style-name="P6" loext:marker-style-name="T1"><text:span text:style-name="T1">Цель работы</text:span><text:span text:style-name="T1"/></text:p>
      <text:p text:style-name="P7" loext:marker-style-name="T2">Разработать систему управления сотрудниками, демонстрирующую множественное наследование, инкапсуляцию и полиморфизм в Python. Система должна уметь обрабатывать различные типы сотрудников, включая менеджеров и технических специалистов, а также предоставлять возможность для расширения и добавления новых ролей.</text:p>
      <text:p text:style-name="P8" loext:marker-style-name="T1">Индивидуальное задание</text:p>
      <text:p text:style-name="P8" loext:marker-style-name="T1"/>
      <text:p text:style-name="P8" loext:marker-style-name="T1"/>
      <text:p text:style-name="P7" loext:marker-style-name="T1"><draw:frame draw:style-name="fr1" draw:name="Изображение2" text:anchor-type="char" svg:width="15.058cm" svg:height="19.463cm" draw:z-index="0"><draw:image xlink:href="Pictures/100000010000029E0000036261ACA4F2.png" xlink:type="simple" xlink:show="embed" xlink:actuate="onLoad" draw:mime-type="image/png"/></draw:frame><text:span text:style-name="T5"/></text:p>
      <text:p text:style-name="Standard" loext:marker-style-name="T1"><text:soft-page-break/><text:span text:style-name="T1">Скриншоты выполнения</text:span><text:span text:style-name="T1"/></text:p>
      <text:p text:style-name="P3" loext:marker-style-name="T2"><draw:frame draw:style-name="fr2" draw:name="Изображение1" text:anchor-type="char" svg:width="16.501cm" svg:height="1.887cm" draw:z-index="1"><draw:image xlink:href="Pictures/10000001000005AB000000A67CE61487.png" xlink:type="simple" xlink:show="embed" xlink:actuate="onLoad" draw:mime-type="image/png"/></draw:frame></text:p>
      <text:p text:style-name="Standard" loext:marker-style-name="T1"><text:span text:style-name="T1">Исходный код программы</text:span><text:span text:style-name="T1"/></text:p>
      <text:p text:style-name="P9" loext:marker-style-name="T6"><text:span text:style-name="T7">class </text:span><text:span text:style-name="T8">Employee</text:span><text:span text:style-name="T6">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identification_num</text:span><text:span text:style-name="T6">=</text:span><text:span text:style-name="T7">None</text:span><text:span text:style-name="T6">, </text:span><text:span text:style-name="T8">name</text:span><text:span text:style-name="T6">=</text:span><text:span text:style-name="T7">None</text:span><text:span text:style-name="T6">):<text:line-break/> <text:s text:c="7"/></text:span><text:span text:style-name="T10">self</text:span><text:span text:style-name="T6">.name = </text:span><text:span text:style-name="T8">name<text:line-break/> <text:s text:c="7"/></text:span><text:span text:style-name="T10">self</text:span><text:span text:style-name="T6">.__identification_num = </text:span><text:span text:style-name="T8">identification_num<text:line-break/><text:line-break/> <text:s text:c="3"/></text:span><text:span text:style-name="T7">def </text:span><text:span text:style-name="T11">get_info</text:span><text:span text:style-name="T6">(</text:span><text:span text:style-name="T10">self</text:span><text:span text:style-name="T6">):<text:line-break/> <text:s text:c="7"/></text:span><text:span text:style-name="T7">return </text:span><text:span text:style-name="T10">self</text:span><text:span text:style-name="T6">.name, </text:span><text:span text:style-name="T10">self</text:span><text:span text:style-name="T6">.__identification_num<text:line-break/><text:line-break/><text:line-break/></text:span><text:span text:style-name="T7">class </text:span><text:span text:style-name="T8">Manager</text:span><text:span text:style-name="T6">(Employee):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name</text:span><text:span text:style-name="T6">, </text:span><text:span text:style-name="T8">identification_num</text:span><text:span text:style-name="T6">, </text:span><text:span text:style-name="T8">department</text:span><text:span text:style-name="T6">):<text:line-break/> <text:s text:c="7"/></text:span><text:span text:style-name="T10">self</text:span><text:span text:style-name="T6">.department = </text:span><text:span text:style-name="T8">department<text:line-break/> <text:s text:c="7"/></text:span><text:span text:style-name="T12">super</text:span><text:span text:style-name="T6">().</text:span><text:span text:style-name="T9">__init__</text:span><text:span text:style-name="T6">(</text:span><text:span text:style-name="T8">name</text:span><text:span text:style-name="T6">, </text:span><text:span text:style-name="T8">identification_num</text:span><text:span text:style-name="T6">)<text:line-break/><text:line-break/> <text:s text:c="3"/></text:span><text:span text:style-name="T7">def </text:span><text:span text:style-name="T11">manage_project</text:span><text:span text:style-name="T6">(</text:span><text:span text:style-name="T10">self</text:span><text:span text:style-name="T6">):<text:line-break/> <text:s text:c="7"/></text:span><text:span text:style-name="T7">pass<text:line-break/><text:line-break/><text:line-break/>class </text:span><text:span text:style-name="T8">Technician</text:span><text:span text:style-name="T6">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specialization</text:span><text:span text:style-name="T6">):<text:line-break/> <text:s text:c="7"/></text:span><text:span text:style-name="T10">self</text:span><text:span text:style-name="T6">.specialization = </text:span><text:span text:style-name="T8">specialization<text:line-break/><text:line-break/> <text:s text:c="3"/></text:span><text:span text:style-name="T7">def </text:span><text:span text:style-name="T11">perform_maintenance</text:span><text:span text:style-name="T6">(</text:span><text:span text:style-name="T10">self</text:span><text:span text:style-name="T6">):<text:line-break/> <text:s text:c="7"/></text:span><text:span text:style-name="T7">pass<text:line-break/><text:line-break/><text:line-break/>class </text:span><text:span text:style-name="T8">TechManager</text:span><text:span text:style-name="T6">(Manager, Technician)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identification_num</text:span><text:span text:style-name="T6">, </text:span><text:span text:style-name="T8">name</text:span><text:span text:style-name="T6">, </text:span><text:span text:style-name="T8">department</text:span><text:span text:style-name="T6">, </text:span><text:span text:style-name="T8">specialization</text:span><text:span text:style-name="T6">):<text:line-break/> <text:s text:c="7"/>Manager.</text:span><text:span text:style-name="T9">__init__</text:span><text:span text:style-name="T6">(</text:span><text:span text:style-name="T10">self</text:span><text:span text:style-name="T6">, </text:span><text:span text:style-name="T8">name</text:span><text:span text:style-name="T6">, </text:span><text:span text:style-name="T8">identification_num</text:span><text:span text:style-name="T6">, </text:span><text:span text:style-name="T8">department</text:span><text:span text:style-name="T6">)<text:line-break/> <text:s text:c="7"/>Technician.</text:span><text:span text:style-name="T9">__init__</text:span><text:span text:style-name="T6">(</text:span><text:span text:style-name="T10">self</text:span><text:span text:style-name="T6">, </text:span><text:span text:style-name="T8">specialization</text:span><text:span text:style-name="T6">)<text:line-break/> <text:s text:c="7"/></text:span><text:span text:style-name="T10">self</text:span><text:span text:style-name="T6">.list = []<text:line-break/><text:line-break/> <text:s text:c="3"/></text:span><text:span text:style-name="T7">def </text:span><text:span text:style-name="T11">manage_project</text:span><text:span text:style-name="T6">(</text:span><text:span text:style-name="T10">self</text:span><text:span text:style-name="T6">):<text:line-break/> <text:s text:c="7"/></text:span><text:span text:style-name="T7">pass<text:line-break/><text:line-break/> <text:s text:c="3"/>def </text:span><text:span text:style-name="T11">perform_maintenance</text:span><text:span text:style-name="T6">(</text:span><text:span text:style-name="T10">self</text:span><text:span text:style-name="T6">):<text:line-break/></text:span><text:soft-page-break/><text:span text:style-name="T6"> <text:s text:c="7"/></text:span><text:span text:style-name="T7">pass<text:line-break/><text:line-break/> <text:s text:c="3"/>def </text:span><text:span text:style-name="T11">add_employee</text:span><text:span text:style-name="T6">(</text:span><text:span text:style-name="T10">self</text:span><text:span text:style-name="T6">, </text:span><text:span text:style-name="T8">identification_num</text:span><text:span text:style-name="T6">, </text:span><text:span text:style-name="T8">name</text:span><text:span text:style-name="T6">, </text:span><text:span text:style-name="T8">department</text:span><text:span text:style-name="T6">, </text:span><text:span text:style-name="T8">specialization</text:span><text:span text:style-name="T6">):<text:line-break/> <text:s text:c="7"/></text:span><text:span text:style-name="T8">user_data </text:span><text:span text:style-name="T6">= {</text:span><text:span text:style-name="T13">'ID'</text:span><text:span text:style-name="T6">: </text:span><text:span text:style-name="T8">identification_num</text:span><text:span text:style-name="T6">, </text:span><text:span text:style-name="T13">'name'</text:span><text:span text:style-name="T6">: </text:span><text:span text:style-name="T8">name</text:span><text:span text:style-name="T6">, </text:span><text:span text:style-name="T13">'department'</text:span><text:span text:style-name="T6">: </text:span><text:span text:style-name="T8">department</text:span><text:span text:style-name="T6">, </text:span><text:span text:style-name="T13">'specialization'</text:span><text:span text:style-name="T6">: </text:span><text:span text:style-name="T8">specialization</text:span><text:span text:style-name="T6">}<text:line-break/> <text:s text:c="7"/></text:span><text:span text:style-name="T10">self</text:span><text:span text:style-name="T6">.list.append(</text:span><text:span text:style-name="T8">user_data</text:span><text:span text:style-name="T6">)<text:line-break/><text:line-break/> <text:s text:c="3"/></text:span><text:span text:style-name="T7">def </text:span><text:span text:style-name="T11">get_team_info</text:span><text:span text:style-name="T6">(</text:span><text:span text:style-name="T10">self</text:span><text:span text:style-name="T6">):<text:line-break/> <text:s text:c="7"/></text:span><text:span text:style-name="T7">return </text:span><text:span text:style-name="T10">self</text:span><text:span text:style-name="T6">.list<text:line-break/><text:line-break/><text:line-break/>emp = Employee(</text:span><text:span text:style-name="T14">1</text:span><text:span text:style-name="T6">, </text:span><text:span text:style-name="T13">"employee1"</text:span><text:span text:style-name="T6">)<text:line-break/></text:span><text:span text:style-name="T12">print</text:span><text:span text:style-name="T6">(emp.get_info())<text:line-break/><text:line-break/>man = Manager(</text:span><text:span text:style-name="T14">2</text:span><text:span text:style-name="T6">, </text:span><text:span text:style-name="T13">"manager1"</text:span><text:span text:style-name="T6">, </text:span><text:span text:style-name="T13">"dep1"</text:span><text:span text:style-name="T6">)<text:line-break/></text:span><text:span text:style-name="T12">print</text:span><text:span text:style-name="T6">(man.get_info())<text:line-break/>man.manage_project()<text:line-break/><text:line-break/>tech = Technician(</text:span><text:span text:style-name="T13">"spec1"</text:span><text:span text:style-name="T6">)<text:line-break/>tech.perform_maintenance()<text:line-break/><text:line-break/>techman = TechManager(</text:span><text:span text:style-name="T13">"John"</text:span><text:span text:style-name="T6">, </text:span><text:span text:style-name="T14">3</text:span><text:span text:style-name="T6">, </text:span><text:span text:style-name="T13">"Couch"</text:span><text:span text:style-name="T6">, </text:span><text:span text:style-name="T13">''</text:span><text:span text:style-name="T6">)<text:line-break/>techman.add_employee(</text:span><text:span text:style-name="T14">4</text:span><text:span text:style-name="T6">, </text:span><text:span text:style-name="T13">"name"</text:span><text:span text:style-name="T6">, </text:span><text:span text:style-name="T13">"department"</text:span><text:span text:style-name="T6">, </text:span><text:span text:style-name="T13">"spec"</text:span><text:span text:style-name="T6">)<text:line-break/>techman.add_employee(</text:span><text:span text:style-name="T14">5</text:span><text:span text:style-name="T6">, </text:span><text:span text:style-name="T13">"Name2"</text:span><text:span text:style-name="T6">, </text:span><text:span text:style-name="T13">"Department2"</text:span><text:span text:style-name="T6">, </text:span><text:span text:style-name="T13">"Specialization2"</text:span><text:span text:style-name="T6">)<text:line-break/></text:span><text:span text:style-name="T12">print</text:span><text:span text:style-name="T6">(techman.get_team_info())<text:line-break/><text:line-break/><text:line-break/></text:span><text:span text:style-name="T7">class </text:span><text:span text:style-name="T8">Employee</text:span><text:span text:style-name="T6">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</text:span><text:span text:style-name="T8">identification_num </text:span><text:span text:style-name="T6">= </text:span><text:span text:style-name="T7">None</text:span><text:span text:style-name="T6">, </text:span><text:span text:style-name="T8">name </text:span><text:span text:style-name="T6">= </text:span><text:span text:style-name="T7">None</text:span><text:span text:style-name="T6">):<text:line-break/> <text:s text:c="7"/></text:span><text:span text:style-name="T10">self</text:span><text:span text:style-name="T6">.name = </text:span><text:span text:style-name="T8">name<text:line-break/> <text:s text:c="7"/></text:span><text:span text:style-name="T10">self</text:span><text:span text:style-name="T6">.__identification_num = </text:span><text:span text:style-name="T8">identification_num<text:line-break/><text:line-break/> <text:s text:c="3"/></text:span><text:span text:style-name="T7">def </text:span><text:span text:style-name="T11">get_info</text:span><text:span text:style-name="T6">(</text:span><text:span text:style-name="T10">self</text:span><text:span text:style-name="T6">):<text:line-break/> <text:s text:c="7"/></text:span><text:span text:style-name="T7">return </text:span><text:span text:style-name="T10">self</text:span><text:span text:style-name="T6">.name, </text:span><text:span text:style-name="T10">self</text:span><text:span text:style-name="T6">.__identification_num<text:line-break/><text:line-break/></text:span><text:span text:style-name="T7">class </text:span><text:span text:style-name="T8">Manager</text:span><text:span text:style-name="T6">(Employee):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name</text:span><text:span text:style-name="T6">, </text:span><text:span text:style-name="T8">identification_num</text:span><text:span text:style-name="T6">, </text:span><text:span text:style-name="T8">department</text:span><text:span text:style-name="T6">):<text:line-break/> <text:s text:c="7"/></text:span><text:span text:style-name="T10">self</text:span><text:span text:style-name="T6">.department = </text:span><text:span text:style-name="T8">department<text:line-break/> <text:s text:c="7"/></text:span><text:span text:style-name="T12">super</text:span><text:span text:style-name="T6">().</text:span><text:span text:style-name="T9">__init__</text:span><text:span text:style-name="T6">(</text:span><text:span text:style-name="T8">name</text:span><text:span text:style-name="T6">, </text:span><text:span text:style-name="T8">identification_num</text:span><text:span text:style-name="T6">)<text:line-break/><text:line-break/> <text:s text:c="3"/></text:span><text:span text:style-name="T7">def </text:span><text:span text:style-name="T11">manage_project</text:span><text:span text:style-name="T6">(</text:span><text:span text:style-name="T10">self</text:span><text:span text:style-name="T6">):<text:line-break/> <text:s text:c="7"/></text:span><text:span text:style-name="T7">pass<text:line-break/><text:line-break/>class </text:span><text:span text:style-name="T8">Technician</text:span><text:span text:style-name="T6">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specialization</text:span><text:span text:style-name="T6">):<text:line-break/></text:span><text:soft-page-break/><text:span text:style-name="T6"> <text:s text:c="7"/></text:span><text:span text:style-name="T10">self</text:span><text:span text:style-name="T6">.specialization = </text:span><text:span text:style-name="T8">specialization<text:line-break/><text:line-break/> <text:s text:c="3"/></text:span><text:span text:style-name="T7">def </text:span><text:span text:style-name="T11">perform_maintenance</text:span><text:span text:style-name="T6">(</text:span><text:span text:style-name="T10">self</text:span><text:span text:style-name="T6">):<text:line-break/> <text:s text:c="7"/></text:span><text:span text:style-name="T7">pass<text:line-break/><text:line-break/>class </text:span><text:span text:style-name="T8">TechManager</text:span><text:span text:style-name="T6">(Manager, Technician):<text:line-break/><text:line-break/> <text:s text:c="3"/></text:span><text:span text:style-name="T7">def </text:span><text:span text:style-name="T9">__init__</text:span><text:span text:style-name="T6">(</text:span><text:span text:style-name="T10">self</text:span><text:span text:style-name="T6">, </text:span><text:span text:style-name="T8">identification_num</text:span><text:span text:style-name="T6">, </text:span><text:span text:style-name="T8">name</text:span><text:span text:style-name="T6">, </text:span><text:span text:style-name="T8">department</text:span><text:span text:style-name="T6">, </text:span><text:span text:style-name="T8">specialization</text:span><text:span text:style-name="T6">):<text:line-break/> <text:s text:c="7"/>Manager.</text:span><text:span text:style-name="T9">__init__</text:span><text:span text:style-name="T6">(</text:span><text:span text:style-name="T10">self</text:span><text:span text:style-name="T6">, </text:span><text:span text:style-name="T8">name</text:span><text:span text:style-name="T6">, </text:span><text:span text:style-name="T8">identification_num</text:span><text:span text:style-name="T6">, </text:span><text:span text:style-name="T8">department</text:span><text:span text:style-name="T6">)<text:line-break/> <text:s text:c="7"/>Technician.</text:span><text:span text:style-name="T9">__init__</text:span><text:span text:style-name="T6">(</text:span><text:span text:style-name="T10">self</text:span><text:span text:style-name="T6">, </text:span><text:span text:style-name="T8">specialization</text:span><text:span text:style-name="T6">)<text:line-break/> <text:s text:c="7"/></text:span><text:span text:style-name="T10">self</text:span><text:span text:style-name="T6">.list = []<text:line-break/><text:line-break/> <text:s text:c="3"/></text:span><text:span text:style-name="T7">def </text:span><text:span text:style-name="T11">manage_project</text:span><text:span text:style-name="T6">(</text:span><text:span text:style-name="T10">self</text:span><text:span text:style-name="T6">):<text:line-break/> <text:s text:c="7"/></text:span><text:span text:style-name="T7">pass<text:line-break/><text:line-break/> <text:s text:c="3"/>def </text:span><text:span text:style-name="T11">perform_maintenance</text:span><text:span text:style-name="T6">(</text:span><text:span text:style-name="T10">self</text:span><text:span text:style-name="T6">):<text:line-break/> <text:s text:c="7"/></text:span><text:span text:style-name="T7">pass<text:line-break/><text:line-break/> <text:s text:c="3"/>def </text:span><text:span text:style-name="T11">add_employee</text:span><text:span text:style-name="T6">(</text:span><text:span text:style-name="T10">self</text:span><text:span text:style-name="T6">, </text:span><text:span text:style-name="T8">identification_num</text:span><text:span text:style-name="T6">, </text:span><text:span text:style-name="T8">name</text:span><text:span text:style-name="T6">, </text:span><text:span text:style-name="T8">department</text:span><text:span text:style-name="T6">, </text:span><text:span text:style-name="T8">specialization</text:span><text:span text:style-name="T6">):<text:line-break/> <text:s text:c="7"/></text:span><text:span text:style-name="T8">user_data </text:span><text:span text:style-name="T6">= {</text:span><text:span text:style-name="T13">'ID'</text:span><text:span text:style-name="T6">: </text:span><text:span text:style-name="T8">identification_num</text:span><text:span text:style-name="T6">, </text:span><text:span text:style-name="T13">'name'</text:span><text:span text:style-name="T6">: </text:span><text:span text:style-name="T8">name</text:span><text:span text:style-name="T6">, </text:span><text:span text:style-name="T13">'department'</text:span><text:span text:style-name="T6">: </text:span><text:span text:style-name="T8">department</text:span><text:span text:style-name="T6">, </text:span><text:span text:style-name="T13">'specialization'</text:span><text:span text:style-name="T6">: </text:span><text:span text:style-name="T8">specialization</text:span><text:span text:style-name="T6">}<text:line-break/> <text:s text:c="7"/></text:span><text:span text:style-name="T10">self</text:span><text:span text:style-name="T6">.list.append(</text:span><text:span text:style-name="T8">user_data</text:span><text:span text:style-name="T6">)<text:line-break/><text:line-break/> <text:s text:c="3"/></text:span><text:span text:style-name="T7">def </text:span><text:span text:style-name="T11">get_team_info</text:span><text:span text:style-name="T6">(</text:span><text:span text:style-name="T10">self</text:span><text:span text:style-name="T6">):<text:line-break/> <text:s text:c="7"/></text:span><text:span text:style-name="T7">return </text:span><text:span text:style-name="T10">self</text:span><text:span text:style-name="T6">.list<text:line-break/><text:line-break/>emp = Employee(</text:span><text:span text:style-name="T14">1</text:span><text:span text:style-name="T6">, </text:span><text:span text:style-name="T13">"employee1"</text:span><text:span text:style-name="T6">)<text:line-break/></text:span><text:span text:style-name="T12">print</text:span><text:span text:style-name="T6">(emp.get_info())<text:line-break/><text:line-break/>man = Manager(</text:span><text:span text:style-name="T14">2</text:span><text:span text:style-name="T6">, </text:span><text:span text:style-name="T13">"manager1"</text:span><text:span text:style-name="T6">, </text:span><text:span text:style-name="T13">"dep1"</text:span><text:span text:style-name="T6">)<text:line-break/></text:span><text:span text:style-name="T12">print</text:span><text:span text:style-name="T6">(man.get_info())<text:line-break/>man.manage_project()<text:line-break/><text:line-break/>tech = Technician(</text:span><text:span text:style-name="T13">"spec1"</text:span><text:span text:style-name="T6">)<text:line-break/>tech.perform_maintenance()<text:line-break/><text:line-break/>techman = TechManager(</text:span><text:span text:style-name="T13">"John"</text:span><text:span text:style-name="T6">, </text:span><text:span text:style-name="T14">3</text:span><text:span text:style-name="T6">, </text:span><text:span text:style-name="T13">"Couch"</text:span><text:span text:style-name="T6">, </text:span><text:span text:style-name="T13">''</text:span><text:span text:style-name="T6">)<text:line-break/>techman.add_employee(</text:span><text:span text:style-name="T14">4</text:span><text:span text:style-name="T6">, </text:span><text:span text:style-name="T13">"name"</text:span><text:span text:style-name="T6">, </text:span><text:span text:style-name="T13">"department"</text:span><text:span text:style-name="T6">, </text:span><text:span text:style-name="T13">"spec"</text:span><text:span text:style-name="T6">)<text:line-break/>techman.add_employee(</text:span><text:span text:style-name="T14">5</text:span><text:span text:style-name="T6">, </text:span><text:span text:style-name="T13">"Name2"</text:span><text:span text:style-name="T6">, </text:span><text:span text:style-name="T13">"Department2"</text:span><text:span text:style-name="T6">, </text:span><text:span text:style-name="T13">"Specialization2"</text:span><text:span text:style-name="T6">)<text:line-break/></text:span><text:span text:style-name="T12">print</text:span><text:span text:style-name="T6">(techman.get_team_info())</text:span></text:p>
      <text:p text:style-name="P3" loext:marker-style-name="T2"/>
      <text:p text:style-name="P1" loext:marker-style-name="T1"><text:span text:style-name="T1">Заключение</text:span><text:span text:style-name="T1"/></text:p>
      <text:p text:style-name="P10" loext:marker-style-name="T2"><text:span text:style-name="T2">В результате выполнения лабораторной работы в программе реализованы методы множественного наследования, инкапсуляции и полиморфизма в Python.</text:span></text:p>
      <text:p text:style-name="P11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4:31:00</meta:creation-date>
    <meta:initial-creator>Nik</meta:initial-creator>
    <dc:language>ru-RU</dc:language>
    <dc:date>2025-12-10T18:24:51.040091448</dc:date>
    <meta:editing-cycles>4</meta:editing-cycles>
    <meta:editing-duration>PT31M53S</meta:editing-duration>
    <meta:generator>LibreOffice/25.8.2.2$Linux_X86_64 LibreOffice_project/580$Build-2</meta:generator>
    <meta:document-statistic meta:table-count="0" meta:image-count="2" meta:object-count="0" meta:page-count="5" meta:paragraph-count="20" meta:word-count="359" meta:character-count="4330" meta:non-whitespace-character-count="3607"/>
    <meta:user-defined meta:name="AppVersion">15.0000</meta:user-defined>
    <meta:template xlink:type="simple" xlink:actuate="onRequest" xlink:title="Normal" xlink:href=""/>
  </office:meta>
</office:document-meta>
</file>
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2000000ABF041DB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.282cm" style:contextual-spacing="false" fo:break-before="page"/>
    </style:style>
    <style:style style:name="P7" style:family="paragraph" style:parent-style-name="Standard">
      <loext:graphic-properties draw:fill="solid" draw:fill-color="#ffffff"/>
      <style:paragraph-properties fo:background-color="#ffffff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Courier New" fo:font-size="10pt" style:font-size-asian="10pt" style:font-name-complex="Courier New1" style:font-size-complex="10pt"/>
    </style:style>
    <style:style style:name="P9" style:family="paragraph" style:parent-style-name="Standard">
      <style:paragraph-properties fo:margin-top="0cm" fo:margin-bottom="0.282cm" style:contextual-spacing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6e2d1" style:font-size-asian="12pt" style:font-name-complex="Times New Roman1" style:font-size-complex="12pt"/>
    </style:style>
    <style:style style:name="T4" style:family="text">
      <style:text-properties fo:color="#08080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8c8c8c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6" style:family="text">
      <style:text-properties fo:color="#0033b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627a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9" style:family="text">
      <style:text-properties fo:color="#94558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008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67d17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37a6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3" style:family="text">
      <style:text-properties fo:color="#1750eb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200b2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5" style:family="text">
      <style:text-properties style:font-name="Courier New" fo:font-size="10pt" style:font-size-asian="10pt" style:font-name-complex="Courier New1" style:font-size-complex="10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ЦИФРОВОГО РАЗВИТИЯ, СВЯЗИ И МАССОВЫХ КОММУНИКАЦИЙ РОССИЙСКОЙ ФЕДЕРАЦИИ</text:span><text:span text:style-name="T1"/></text:p>
      <text:p text:style-name="P1" loext:marker-style-name="T1"><text:span text:style-name="T1">Ордена Трудового Красного Знамени федеральное государственное бюджетное образовательное учреждение высшего образования</text:span><text:span text:style-name="T1"/></text:p>
      <text:p text:style-name="P1" loext:marker-style-name="T1"><text:span text:style-name="T1">«Московский технический университет связи и информатики»</text:span><text:span text:style-name="T1"/></text:p>
      <text:p text:style-name="P2" loext:marker-style-name="T2"/>
      <text:p text:style-name="P1" loext:marker-style-name="T2"><text:span text:style-name="T2">Кафедра Программная инженерия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" loext:marker-style-name="T2"><text:span text:style-name="T2">ОТЧЕТ</text:span><text:span text:style-name="T2"/></text:p>
      <text:p text:style-name="P1" loext:marker-style-name="T2"><text:span text:style-name="T2">по лабораторной работе №</text:span><text:span text:style-name="T3">6</text:span></text:p>
      <text:p text:style-name="P1" loext:marker-style-name="T2"><text:span text:style-name="T2">по дисциплине «Введение в информационные технологии»</text:span><text:span text:style-name="T2"/></text:p>
      <text:p text:style-name="P2" loext:marker-style-name="T2"/>
      <text:p text:style-name="P1" loext:marker-style-name="T2"><text:span text:style-name="T2">Тема: «Работа с классами</text:span><text:span text:style-name="T3">, часть 2</text:span><text:span text:style-name="T2">»</text:span></text:p>
      <text:p text:style-name="P3" loext:marker-style-name="T2"/>
      <text:p text:style-name="P4" loext:marker-style-name="T2"><text:span text:style-name="T2">Выполнил: студент группы БВТ2504</text:span><text:span text:style-name="T2"/></text:p>
      <text:p text:style-name="P4" loext:marker-style-name="T2"><text:span text:style-name="T2">Гапеев Алексей Денисович</text:span><text:span text:style-name="T2"/></text:p>
      <text:p text:style-name="P5" loext:marker-style-name="T2"/>
      <text:p text:style-name="P4" loext:marker-style-name="T2"><text:span text:style-name="T2">Проверил: Харрасов К.Р.</text:span><text:span text:style-name="T2"/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3" loext:marker-style-name="T2"/>
      <text:p text:style-name="P1" loext:marker-style-name="T2"><text:span text:style-name="T2">Москва, 2025</text:span><text:span text:style-name="T2"/></text:p>
      <text:p text:style-name="P6" loext:marker-style-name="T1"><text:span text:style-name="T1">Цель работы</text:span><text:span text:style-name="T1"/></text:p>
      <text:p text:style-name="P3" loext:marker-style-name="T2">Получить практический опыт работы с ООП в Python. использование инкапсуляции, наследования.</text:p>
      <text:p text:style-name="Standard" loext:marker-style-name="T1"><text:span text:style-name="T1">Индивидуальное задание</text:span><text:span text:style-name="T1"/></text:p>
      <text:p text:style-name="Standard" loext:marker-style-name="T1"><text:span text:style-name="T1">Задание 1: Базовый класс и методы</text:span><text:span text:style-name="T1"/></text:p>
      <text:p text:style-name="Standard" loext:marker-style-name="T2"><text:span text:style-name="T2">1. Определите класс Book, который имеет три атрибута: title (название), author (автор), и year (год издания).</text:span><text:span text:style-name="T2"/></text:p>
      <text:p text:style-name="Standard" loext:marker-style-name="T2"><text:span text:style-name="T2">2. Добавьте метод get_info(), который возвращает информацию о книге в формате: "Название книги: [title], Автор: [author], Год издания: [year]".</text:span><text:span text:style-name="T2"/></text:p>
      <text:p text:style-name="Standard" loext:marker-style-name="T1"><text:span text:style-name="T1">Задание 2: Работа с конструктором</text:span><text:span text:style-name="T1"/></text:p>
      <text:p text:style-name="Standard" loext:marker-style-name="T2"><text:span text:style-name="T2">1. Определите класс Circle для представления круга.</text:span><text:span text:style-name="T2"/></text:p>
      <text:p text:style-name="Standard" loext:marker-style-name="T2"><text:span text:style-name="T2">2. Используйте конструктор __init__ для инициализации радиуса круга (radius).</text:span><text:span text:style-name="T2"/></text:p>
      <text:p text:style-name="Standard" loext:marker-style-name="T2"><text:span text:style-name="T2">3. Добавьте метод get_radius(), который возвращает значение радиуса.</text:span><text:span text:style-name="T2"/></text:p>
      <text:p text:style-name="Standard" loext:marker-style-name="T2"><text:span text:style-name="T2">4. Добавьте метод set_radius(new_radius), который позволяет изменить радиус круга.</text:span><text:span text:style-name="T2"/></text:p>
      <text:p text:style-name="Standard" loext:marker-style-name="T2"><text:span text:style-name="T2">5. Создайте объект класса Circle, измените его радиус и выведите новый радиус на экран</text:span><text:span text:style-name="T2"/></text:p>
      <text:p text:style-name="P3" loext:marker-style-name="T2"/>
      <text:p text:style-name="Standard" loext:marker-style-name="T1"><text:span text:style-name="T1">Скриншоты выполнения</text:span><text:span text:style-name="T1"/></text:p>
      <text:p text:style-name="P3" loext:marker-style-name="T2"><draw:frame draw:style-name="fr1" draw:name="Изображение1" text:anchor-type="char" svg:y="0.002cm" svg:width="16.501cm" svg:height="4.288cm" draw:z-index="0"><draw:image xlink:href="Pictures/1000000100000292000000ABF041DB55.png" xlink:type="simple" xlink:show="embed" xlink:actuate="onLoad" draw:mime-type="image/png"/></draw:frame></text:p>
      <text:p text:style-name="Standard" loext:marker-style-name="T1"><text:span text:style-name="T1">Исходный код программы</text:span><text:span text:style-name="T1"/></text:p>
      <text:p text:style-name="P3" loext:marker-style-name="T2"/>
      <text:p text:style-name="P7" loext:marker-style-name="T4"><text:span text:style-name="T5"># Задание 1.<text:line-break/></text:span><text:span text:style-name="T6">class <text:s/></text:span><text:span text:style-name="T7">Book</text:span><text:span text:style-name="T4">:<text:line-break/> <text:s text:c="3"/>title = </text:span><text:span text:style-name="T6">None<text:line-break/> <text:s text:c="3"/></text:span><text:span text:style-name="T4">author = </text:span><text:span text:style-name="T6">None<text:line-break/> <text:s text:c="3"/></text:span><text:span text:style-name="T4">year = </text:span><text:span text:style-name="T6">None<text:line-break/><text:line-break/> <text:s text:c="3"/>def </text:span><text:span text:style-name="T8">get_info</text:span><text:span text:style-name="T4">(</text:span><text:span text:style-name="T9">self</text:span><text:span text:style-name="T4">):<text:line-break/> <text:s text:c="7"/></text:span><text:span text:style-name="T10">print</text:span><text:span text:style-name="T4">(</text:span><text:span text:style-name="T11">f'Название книги: </text:span><text:span text:style-name="T12">{</text:span><text:span text:style-name="T9">self</text:span><text:span text:style-name="T4">.title</text:span><text:span text:style-name="T12">}</text:span><text:span text:style-name="T11">, Автор: </text:span><text:span text:style-name="T12">{</text:span><text:span text:style-name="T9">self</text:span><text:span text:style-name="T4">.author</text:span><text:span text:style-name="T12">}</text:span><text:span text:style-name="T11">, Год издания: </text:span><text:span text:style-name="T12">{</text:span><text:span text:style-name="T9">self</text:span><text:span text:style-name="T4">.year</text:span><text:span text:style-name="T12">}</text:span><text:span text:style-name="T11">'</text:span><text:span text:style-name="T4">)<text:line-break/><text:line-break/>book1 = Book()<text:line-break/>book1.title = </text:span><text:span text:style-name="T11">"Мастер и Маргарита"<text:line-break/></text:span><text:soft-page-break/><text:span text:style-name="T4">book1.author = </text:span><text:span text:style-name="T11">"Михаил Булгаков"<text:line-break/></text:span><text:span text:style-name="T4">book1.year = </text:span><text:span text:style-name="T13">1967<text:line-break/><text:line-break/></text:span><text:span text:style-name="T4">book1.get_info()<text:line-break/><text:line-break/></text:span><text:span text:style-name="T5"># Задание 2.<text:line-break/><text:line-break/></text:span><text:span text:style-name="T6">class </text:span><text:span text:style-name="T7">Circle</text:span><text:span text:style-name="T4">:<text:line-break/><text:line-break/> <text:s text:c="3"/></text:span><text:span text:style-name="T6">def </text:span><text:span text:style-name="T14">__init__</text:span><text:span text:style-name="T4">(</text:span><text:span text:style-name="T9">self</text:span><text:span text:style-name="T4">, </text:span><text:span text:style-name="T7">radius</text:span><text:span text:style-name="T4">):<text:line-break/> <text:s text:c="7"/></text:span><text:span text:style-name="T9">self</text:span><text:span text:style-name="T4">.radius = </text:span><text:span text:style-name="T7">radius<text:line-break/><text:line-break/> <text:s text:c="3"/></text:span><text:span text:style-name="T6">def </text:span><text:span text:style-name="T8">get_radius</text:span><text:span text:style-name="T4">(</text:span><text:span text:style-name="T9">self</text:span><text:span text:style-name="T4">):<text:line-break/> <text:s text:c="7"/></text:span><text:span text:style-name="T6">return </text:span><text:span text:style-name="T9">self</text:span><text:span text:style-name="T4">.radius<text:line-break/><text:line-break/> <text:s text:c="3"/></text:span><text:span text:style-name="T6">def </text:span><text:span text:style-name="T8">set_radius</text:span><text:span text:style-name="T4">(</text:span><text:span text:style-name="T9">self</text:span><text:span text:style-name="T4">, </text:span><text:span text:style-name="T7">new_radius</text:span><text:span text:style-name="T4">):<text:line-break/> <text:s text:c="7"/></text:span><text:span text:style-name="T9">self</text:span><text:span text:style-name="T4">.radius = </text:span><text:span text:style-name="T7">new_radius<text:line-break/><text:line-break/></text:span><text:span text:style-name="T10">print</text:span><text:span text:style-name="T4">(</text:span><text:span text:style-name="T11">"Задание 2."</text:span><text:span text:style-name="T4">)<text:line-break/>radius1 = Circle(</text:span><text:span text:style-name="T13">15</text:span><text:span text:style-name="T4">)<text:line-break/></text:span><text:span text:style-name="T10">print</text:span><text:span text:style-name="T4">(</text:span><text:span text:style-name="T11">"Радиус: "</text:span><text:span text:style-name="T4">, radius1.get_radius())<text:line-break/>radius1.set_radius(</text:span><text:span text:style-name="T13">33</text:span><text:span text:style-name="T4">)<text:line-break/></text:span><text:span text:style-name="T10">print</text:span><text:span text:style-name="T4">(</text:span><text:span text:style-name="T11">"Новый радиус: "</text:span><text:span text:style-name="T4">, radius1.get_radius())</text:span></text:p>
      <text:p text:style-name="P8" loext:marker-style-name="T15"/>
      <text:p text:style-name="P3" loext:marker-style-name="T2"/>
      <text:p text:style-name="P1" loext:marker-style-name="T1"><text:span text:style-name="T1">Заключение</text:span><text:span text:style-name="T1"/></text:p>
      <text:p text:style-name="Standard" loext:marker-style-name="T2"><text:span text:style-name="T2">В ходе выполнения лабораторной работы были успешно решены следующие задачи:</text:span><text:span text:style-name="T2"/></text:p>
      <text:p text:style-name="Standard" loext:marker-style-name="T2"><text:span text:style-name="T2">1. Освоены методы работы с базовыми классами и методами ООП,</text:span><text:span text:style-name="T2"/></text:p>
      <text:p text:style-name="Standard" loext:marker-style-name="T2"><text:span text:style-name="T2">2. Изучена работа с конструктором класса.</text:span><text:span text:style-name="T2"/></text:p>
      <text:p text:style-name="P9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e74b5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e74b5" fo:border-bottom="0.51pt solid #2e74b5"/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e74b5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e74b5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14:31:00</meta:creation-date>
    <meta:initial-creator>Nik</meta:initial-creator>
    <dc:language>ru-RU</dc:language>
    <dc:date>2025-11-25T14:35:46.913837529</dc:date>
    <meta:editing-cycles>3</meta:editing-cycles>
    <meta:editing-duration>PT16M58S</meta:editing-duration>
    <meta:generator>LibreOffice/25.8.2.2$Linux_X86_64 LibreOffice_project/580$Build-2</meta:generator>
    <meta:document-statistic meta:table-count="0" meta:image-count="1" meta:object-count="0" meta:page-count="3" meta:paragraph-count="31" meta:word-count="272" meta:character-count="2211" meta:non-whitespace-character-count="1900"/>
    <meta:user-defined meta:name="AppVersion">15.0000</meta:user-defined>
    <meta:template xlink:type="simple" xlink:actuate="onRequest" xlink:title="Normal" xlink:href=""/>
  </office:meta>
</office:document-meta>
</file>